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B700000318D0562469.png" manifest:media-type="image/png"/>
  <manifest:file-entry manifest:full-path="Pictures/100000000000014000000140E2D852B9.png" manifest:media-type="image/png"/>
  <manifest:file-entry manifest:full-path="Pictures/10000000000001AD00000140F6E1821A.png" manifest:media-type="image/png"/>
  <manifest:file-entry manifest:full-path="Pictures/10000000000002BC00000145644B7FDA.png" manifest:media-type="image/png"/>
  <manifest:file-entry manifest:full-path="Pictures/10000001000009960000058F91EC80B8.png" manifest:media-type="image/png"/>
  <manifest:file-entry manifest:full-path="Pictures/100000010000037900000168EB10360E.png" manifest:media-type="image/png"/>
  <manifest:file-entry manifest:full-path="Pictures/100000010000099D00000583C62A0231.png" manifest:media-type="image/png"/>
  <manifest:file-entry manifest:full-path="Pictures/1000000100000420000002BF8E01080D.png" manifest:media-type="image/png"/>
  <manifest:file-entry manifest:full-path="Pictures/10000000000001E000000117415D8AA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6.5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loext:graphic-properties draw:fill-color="#ffffff"/>
      <style:text-properties style:font-name="Times New Roman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"/>
    </style:style>
    <style:style style:name="P5" style:family="paragraph">
      <style:text-properties style:font-name="Times New Roman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text-properties style:font-name="Times New Roman" fo:font-size="22pt" style:font-size-asian="22pt" style:font-size-complex="22pt"/>
    </style:style>
    <style:style style:name="P9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6.5cm" svg:x="1.4cm" svg:y="2cm" presentation:class="title" presentation:user-transformed="true">
          <draw:text-box>
            <text:p><text:span text:style-name="T1">Проект Яндекс Лицей: MemGen — Генератор мемов</text:span></text:p>
          </draw:text-box>
        </draw:frame>
        <draw:frame presentation:style-name="pr2" draw:text-style-name="P2" draw:layer="layout" svg:width="14.199cm" svg:height="2.5cm" svg:x="12.801cm" svg:y="10.516cm" presentation:class="subtitle" presentation:user-transformed="true">
          <draw:text-box>
            <text:p><text:span text:style-name="T2">Автор: Мироненко Максим Сергее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1">Актуальность и идея</text:span></text:p>
          </draw:text-box>
        </draw:frame>
        <draw:frame presentation:style-name="pr5" draw:text-style-name="P5" draw:layer="layout" svg:width="25.199cm" svg:height="7.315cm" svg:x="1.4cm" svg:y="3.685cm" presentation:class="outline" presentation:user-transformed="true">
          <draw:text-box>
            <text:list text:style-name="L2">
              <text:list-item>
                <text:p><text:span text:style-name="T3">Мемы — часть интернет-культуры </text:span></text:p>
              </text:list-item>
              <text:list-item>
                <text:p><text:span text:style-name="T3">Создание мемов требует времени и умения работы с графическими редакторами</text:span></text:p>
              </text:list-item>
              <text:list-item>
                <text:p><text:span text:style-name="T3">MemGen — отличный выбор, так как имеет простой алгоритм работы: выбрал шаблон или создал свой → написал текст сверху и снизу → получил готовый мем</text:span></text:p>
              </text:list-item>
            </text:list>
            <text:p><text:span text:style-name="T3"/></text:p>
            <text:list text:continue-numbering="true" text:style-name="L2">
              <text:list-header>
                <text:p><text:span text:style-name="T3"/></text:p>
              </text:list-header>
            </text:list>
          </draw:text-box>
        </draw:frame>
        <draw:frame draw:style-name="gr2" draw:text-style-name="P6" draw:layer="layout" svg:width="7.566cm" svg:height="5.643cm" svg:x="19.033cm" svg:y="9.857cm">
          <draw:image xlink:href="Pictures/10000000000001AD00000140F6E182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1">Что умеет MemGen</text:span></text:p>
          </draw:text-box>
        </draw:frame>
        <draw:frame presentation:style-name="pr5" draw:text-style-name="P8" draw:layer="layout" svg:width="14cm" svg:height="5.815cm" svg:x="0.5cm" svg:y="3.685cm" presentation:class="outline" presentation:user-transformed="true">
          <draw:text-box>
            <text:list text:style-name="L2">
              <text:list-header>
                <text:p text:style-name="P7"><text:span text:style-name="T4">Создание мемов:</text:span></text:p>
                <text:p text:style-name="P7"><text:span text:style-name="T4">- Выбор шаблона из библиотеки</text:span></text:p>
                <text:p text:style-name="P7"><text:span text:style-name="T4">- Добавление верхнего и нижнего текста</text:span></text:p>
                <text:p text:style-name="P7"><text:span text:style-name="T4">- Наложение тегов для поиска</text:span></text:p>
                <text:p text:style-name="P7"><text:span text:style-name="T4"/></text:p>
              </text:list-header>
            </text:list>
          </draw:text-box>
        </draw:frame>
        <draw:frame presentation:style-name="pr5" draw:text-style-name="P8" draw:layer="layout" svg:width="13.5cm" svg:height="5.815cm" svg:x="14cm" svg:y="3.686cm" presentation:class="outline" presentation:user-transformed="true">
          <draw:text-box>
            <text:list text:style-name="L2">
              <text:list-header>
                <text:p text:style-name="P7"><text:span text:style-name="T4">Работа с контентом:</text:span></text:p>
                <text:p text:style-name="P7"><text:span text:style-name="T4">- Галерея всех мемов пользователя</text:span></text:p>
                <text:p text:style-name="P7"><text:span text:style-name="T4">- Избранное для сохранения понравившихся</text:span></text:p>
                <text:p text:style-name="P7"><text:span text:style-name="T4">- Загрузка собственных шаблонов</text:span></text:p>
                <text:p text:style-name="P7"><text:span text:style-name="T4"/></text:p>
              </text:list-header>
            </text:list>
          </draw:text-box>
        </draw:frame>
        <draw:frame presentation:style-name="pr5" draw:text-style-name="P8" draw:layer="layout" svg:width="14cm" svg:height="5.815cm" svg:x="0.5cm" svg:y="3.686cm" presentation:class="outline" presentation:user-transformed="true">
          <draw:text-box>
            <text:list text:style-name="L2">
              <text:list-header>
                <text:p text:style-name="P7"><text:span text:style-name="T4">Создание мемов:</text:span></text:p>
                <text:p text:style-name="P7"><text:span text:style-name="T4">- Выбор шаблона из библиотеки</text:span></text:p>
                <text:p text:style-name="P7"><text:span text:style-name="T4">- Добавление верхнего и нижнего текста</text:span></text:p>
                <text:p text:style-name="P7"><text:span text:style-name="T4">- Наложение тегов для поиска</text:span></text:p>
                <text:p text:style-name="P7"><text:span text:style-name="T4"/></text:p>
              </text:list-header>
            </text:list>
          </draw:text-box>
        </draw:frame>
        <draw:frame presentation:style-name="pr5" draw:text-style-name="P8" draw:layer="layout" svg:width="12.5cm" svg:height="5.5cm" svg:x="14.5cm" svg:y="9.5cm" presentation:class="outline" presentation:user-transformed="true">
          <draw:text-box>
            <text:list text:style-name="L2">
              <text:list-header>
                <text:p text:style-name="P7"><text:span text:style-name="T4">Надёжность:</text:span></text:p>
                <text:p text:style-name="P7"><text:span text:style-name="T4">- Автоматическое резервное копирование БД</text:span></text:p>
                <text:p text:style-name="P7"><text:span text:style-name="T4">- Восстановление данных из <text:s text:c="2"/>бэкапов</text:span></text:p>
                <text:p text:style-name="P7"><text:span text:style-name="T4"/></text:p>
              </text:list-header>
            </text:list>
          </draw:text-box>
        </draw:frame>
        <draw:frame presentation:style-name="pr5" draw:text-style-name="P8" draw:layer="layout" svg:width="14cm" svg:height="5.815cm" svg:x="0.5cm" svg:y="3.687cm" presentation:class="outline" presentation:user-transformed="true">
          <draw:text-box>
            <text:list text:style-name="L2">
              <text:list-header>
                <text:p text:style-name="P7"><text:span text:style-name="T4">Создание мемов:</text:span></text:p>
                <text:p text:style-name="P7"><text:span text:style-name="T4">- Выбор шаблона из библиотеки</text:span></text:p>
                <text:p text:style-name="P7"><text:span text:style-name="T4">- Добавление верхнего и нижнего текста</text:span></text:p>
                <text:p text:style-name="P7"><text:span text:style-name="T4">- Наложение тегов для поиска</text:span></text:p>
                <text:p text:style-name="P7"><text:span text:style-name="T4"/></text:p>
              </text:list-header>
            </text:list>
          </draw:text-box>
        </draw:frame>
        <draw:frame presentation:style-name="pr5" draw:text-style-name="P8" draw:layer="layout" svg:width="12.5cm" svg:height="5.499cm" svg:x="1cm" svg:y="9.501cm" presentation:class="outline" presentation:user-transformed="true">
          <draw:text-box>
            <text:list text:style-name="L2">
              <text:list-header>
                <text:p text:style-name="P7"><text:span text:style-name="T4">Управление профилем:</text:span></text:p>
                <text:p text:style-name="P7"><text:span text:style-name="T4">- Регистрация и авторизация</text:span></text:p>
                <text:p text:style-name="P7"><text:span text:style-name="T4">- Смена аватара, имени, пароля</text:span></text:p>
                <text:p text:style-name="P7"><text:span text:style-name="T4">- Удаление своих мемов</text:span></text:p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1">Применённые технологии</text:span></text:p>
          </draw:text-box>
        </draw:frame>
        <draw:frame presentation:style-name="pr5" draw:layer="layout" svg:width="16.1cm" svg:height="9.315cm" svg:x="1.9cm" svg:y="4cm" presentation:class="outline" presentation:user-transformed="true">
          <draw:text-box>
            <text:list text:style-name="L2">
              <text:list-header>
                <text:p text:style-name="P7"><text:span text:style-name="T4">При создании приложения были использованы:</text:span></text:p>
                <text:p text:style-name="P7"><text:span text:style-name="T4">- Python 3.12 + Flask</text:span></text:p>
                <text:p text:style-name="P7"><text:span text:style-name="T4">- SQLite + SQLAlchemy</text:span></text:p>
                <text:p text:style-name="P7"><text:span text:style-name="T4">- Bootstrap 5</text:span></text:p>
                <text:p text:style-name="P7"><text:span text:style-name="T4">- Flask-Login</text:span></text:p>
                <text:p text:style-name="P7"><text:span text:style-name="T4">- Pillow (PIL)</text:span></text:p>
                <text:p text:style-name="P7"><text:span text:style-name="T4">- Объём кода: ~550 строк</text:span></text:p>
              </text:list-header>
            </text:list>
          </draw:text-box>
        </draw:frame>
        <draw:frame draw:style-name="gr2" draw:text-style-name="P6" draw:layer="layout" svg:width="8.5cm" svg:height="9.5cm" svg:x="18.5cm" svg:y="4cm">
          <draw:image xlink:href="Pictures/100000000000014000000140E2D852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1">Алгоритм создания мема</text:span></text:p>
          </draw:text-box>
        </draw:frame>
        <draw:frame presentation:style-name="pr5" draw:text-style-name="P8" draw:layer="layout" svg:width="13.699cm" svg:height="5.634cm" svg:x="0.301cm" svg:y="4cm" presentation:class="outline" presentation:user-transformed="true">
          <draw:text-box>
            <text:list text:style-name="L2">
              <text:list-header>
                <text:p text:style-name="P7"><text:span text:style-name="T4">Открыть изображение</text:span></text:p>
                <text:p text:style-name="P7"><text:span text:style-name="T4">Наложить верхний текст с обводкой</text:span></text:p>
                <text:p text:style-name="P7"><text:span text:style-name="T4">Наложить нижний текст с обводкой</text:span></text:p>
                <text:p text:style-name="P7"><text:span text:style-name="T4">Сохранить как JPEG</text:span></text:p>
                <text:p text:style-name="P7"><text:span text:style-name="T4"/></text:p>
              </text:list-header>
            </text:list>
          </draw:text-box>
        </draw:frame>
        <draw:frame draw:style-name="gr2" draw:text-style-name="P6" draw:layer="layout" svg:width="12.346cm" svg:height="7.732cm" svg:x="15cm" svg:y="3.768cm">
          <draw:image xlink:href="Pictures/10000000000002BC00000145644B7F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2" draw:text-style-name="P6" draw:layer="layout" svg:width="27.16cm" svg:height="14.886cm" svg:x="0.557cm" svg:y="0.614cm">
          <draw:image xlink:href="Pictures/10000001000009960000058F91EC80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1">Алгоритм тегов</text:span></text:p>
          </draw:text-box>
        </draw:frame>
        <draw:frame presentation:style-name="pr5" draw:layer="layout" svg:width="16.6cm" svg:height="9.134cm" svg:x="0.4cm" svg:y="3.5cm" presentation:class="outline" presentation:user-transformed="true">
          <draw:text-box>
            <text:list text:style-name="L2">
              <text:list-header>
                <text:p text:style-name="P7"><text:span text:style-name="T4">Теги создаются только во время создания мема:</text:span></text:p>
                <text:p text:style-name="P7"><text:span text:style-name="T4">- Пользователь вводит теги через пробел</text:span></text:p>
                <text:p text:style-name="P7"><text:span text:style-name="T4">- Система разбивает их на слова</text:span></text:p>
                <text:p text:style-name="P7"><text:span text:style-name="T4">- Каждый тег сохраняется в базу</text:span></text:p>
                <text:p text:style-name="P7"><text:span text:style-name="T4">- Теги привязываются к мему</text:span></text:p>
                <text:p text:style-name="P7"><text:span text:style-name="T4">- По тегу можно найти похожие мемы</text:span></text:p>
                <text:p text:style-name="P7"><text:span text:style-name="T4">По-другому тег не добавить</text:span></text:p>
              </text:list-header>
            </text:list>
          </draw:text-box>
        </draw:frame>
        <draw:frame draw:style-name="gr2" draw:text-style-name="P6" draw:layer="layout" svg:width="9.5cm" svg:height="6.349cm" svg:x="17.5cm" svg:y="5.651cm">
          <draw:image xlink:href="Pictures/100000010000037900000168EB1036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6" draw:layer="layout" svg:width="24.676cm" svg:height="12.399cm" svg:x="1.324cm" svg:y="1.5cm">
          <draw:image xlink:href="Pictures/1000000100000420000002BF8E0108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1">Алгоритм бэкапов</text:span></text:p>
          </draw:text-box>
        </draw:frame>
        <draw:frame presentation:style-name="pr5" draw:text-style-name="P8" draw:layer="layout" svg:width="16cm" svg:height="2.5cm" svg:x="11.5cm" svg:y="3.5cm" presentation:class="outline" presentation:user-transformed="true">
          <draw:text-box>
            <text:list text:style-name="L2">
              <text:list-header>
                <text:p text:style-name="P7"><text:span text:style-name="T4">Что такое бэкап?</text:span></text:p>
                <text:p text:style-name="P7"><text:span text:style-name="T4">- Это копия базы данных на всякий случай</text:span></text:p>
                <text:p text:style-name="P7"><text:span text:style-name="T4"/></text:p>
                <text:p text:style-name="P7"><text:span text:style-name="T4"/></text:p>
              </text:list-header>
            </text:list>
          </draw:text-box>
        </draw:frame>
        <draw:frame presentation:style-name="pr5" draw:text-style-name="P8" draw:layer="layout" svg:width="13.5cm" svg:height="4.134cm" svg:x="0.5cm" svg:y="6.366cm" presentation:class="outline" presentation:user-transformed="true">
          <draw:text-box>
            <text:list text:style-name="L2">
              <text:list-header>
                <text:p text:style-name="P7"><text:span text:style-name="T2">Когда создаётся?</text:span></text:p>
                <text:p text:style-name="P7"><text:span text:style-name="T2">- Автоматически — когда делаешь мем</text:span></text:p>
                <text:p text:style-name="P7"><text:span text:style-name="T2">- Вручную — нажал кнопку и сохранил</text:span></text:p>
                <text:p text:style-name="P7"><text:span text:style-name="T4"/></text:p>
              </text:list-header>
            </text:list>
          </draw:text-box>
        </draw:frame>
        <draw:frame presentation:style-name="pr5" draw:text-style-name="P8" draw:layer="layout" svg:width="12.5cm" svg:height="5cm" svg:x="14.5cm" svg:y="10.5cm" presentation:class="outline" presentation:user-transformed="true">
          <draw:text-box>
            <text:list text:style-name="L2">
              <text:list-header>
                <text:p text:style-name="P7"><text:span text:style-name="T2">Что можно сделать?</text:span></text:p>
                <text:p text:style-name="P7"><text:span text:style-name="T2">- Посмотреть список всех бэкапов</text:span></text:p>
                <text:p text:style-name="P7"><text:span text:style-name="T2">- Восстановить любой старый</text:span></text:p>
                <text:p text:style-name="P7"><text:span text:style-name="T2">- Система хранит только 10 последних</text:span></text:p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3" draw:text-style-name="P9" draw:layer="layout" svg:width="26cm" svg:height="13cm" svg:x="1cm" svg:y="1.5cm">
          <draw:image xlink:href="Pictures/10000001000007B700000318D05624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1">Главный экран</text:span></text:p>
          </draw:text-box>
        </draw:frame>
        <draw:frame draw:style-name="gr2" draw:text-style-name="P6" draw:layer="layout" svg:width="22.5cm" svg:height="11.763cm" svg:x="3cm" svg:y="3.5cm">
          <draw:image xlink:href="Pictures/100000010000099D00000583C62A02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1">Заключение</text:span></text:p>
          </draw:text-box>
        </draw:frame>
        <draw:frame presentation:style-name="pr5" draw:text-style-name="P8" draw:layer="layout" svg:width="25.199cm" svg:height="7.315cm" svg:x="1.4cm" svg:y="3.685cm" presentation:class="outline" presentation:user-transformed="true">
          <draw:text-box>
            <text:list text:style-name="L2">
              <text:list-header>
                <text:p text:style-name="P7"><text:span text:style-name="T4">Проект показывает, что Python и Flask — мощный инструмент для веб-разработки, сочетающий простоту языка с богатыми возможностями библиотек для авторизации, работы с базами данных и обработки изображений.</text:span></text:p>
                <text:p text:style-name="P7"><text:span text:style-name="T4">Приложение готово к использованию и имеет потенциал для дальнейшего развития: добавления Telegram-бота, системы комментариев и экспорта мемов в GIF.</text:span></text:p>
              </text:list-header>
            </text:list>
          </draw:text-box>
        </draw:frame>
        <draw:frame draw:style-name="gr2" draw:text-style-name="P6" draw:layer="layout" svg:width="8.466cm" svg:height="4cm" svg:x="9.034cm" svg:y="11.5cm">
          <draw:image xlink:href="Pictures/10000000000001E000000117415D8A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1T16:11:13.621885900</meta:creation-date>
    <dc:date>2026-05-12T12:38:54.746611100</dc:date>
    <meta:editing-duration>PT4M25S</meta:editing-duration>
    <meta:editing-cycles>2</meta:editing-cycles>
    <meta:generator>LibreOffice/25.8.5.2$Windows_X86_64 LibreOffice_project/9c8b85f387cc00a89945a79c9e6239f32e450ac2</meta:generator>
    <meta:document-statistic meta:object-count="78"/>
  </office:meta>
</office:document-meta>
</file>